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erif" svg:font-family="'DejaVu 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1949d8" officeooo:paragraph-rsid="001949d8"/>
    </style:style>
    <style:style style:name="P2" style:family="paragraph" style:parent-style-name="Heading_20_1">
      <style:text-properties style:font-name="DejaVu Serif" fo:font-size="14pt" style:font-size-asian="14pt" style:font-size-complex="14pt"/>
    </style:style>
    <style:style style:name="P3" style:family="paragraph" style:parent-style-name="Heading_20_2">
      <style:text-properties style:font-name="DejaVu Serif" fo:font-size="14pt" style:font-size-asian="14pt" style:font-size-complex="14pt"/>
    </style:style>
    <style:style style:name="P4" style:family="paragraph" style:parent-style-name="Horizontal_20_Line">
      <style:text-properties style:font-name="DejaVu Serif" fo:font-size="14pt" style:font-size-asian="14pt" style:font-size-complex="14pt"/>
    </style:style>
    <style:style style:name="P5" style:family="paragraph" style:parent-style-name="Standard">
      <style:text-properties style:font-name="DejaVu Serif" fo:font-size="14pt" style:font-size-asian="14pt" style:font-size-complex="14pt"/>
    </style:style>
    <style:style style:name="P6" style:family="paragraph" style:parent-style-name="Text_20_body">
      <style:text-properties style:font-name="DejaVu Serif" fo:font-size="14pt" style:font-size-asian="14pt" style:font-size-complex="14pt"/>
    </style:style>
    <style:style style:name="P7" style:family="paragraph" style:parent-style-name="Heading_20_1">
      <style:text-properties style:font-name="DejaVu Serif" fo:font-size="14pt" style:font-size-asian="14pt" style:font-size-complex="14pt"/>
    </style:style>
    <style:style style:name="P8" style:family="paragraph" style:parent-style-name="Text_20_body" style:list-style-name="L1">
      <style:text-properties style:font-name="DejaVu Serif" fo:font-size="14pt" style:font-size-asian="14pt" style:font-size-complex="14pt"/>
    </style:style>
    <style:style style:name="P9" style:family="paragraph" style:parent-style-name="Text_20_body" style:list-style-name="L2">
      <style:text-properties style:font-name="DejaVu Serif" fo:font-size="14pt" style:font-size-asian="14pt" style:font-size-complex="14pt"/>
    </style:style>
    <style:style style:name="P10" style:family="paragraph" style:parent-style-name="Text_20_body" style:list-style-name="L3">
      <style:text-properties style:font-name="DejaVu Serif" fo:font-size="14pt" style:font-size-asian="14pt" style:font-size-complex="14pt"/>
    </style:style>
    <style:style style:name="P11" style:family="paragraph" style:parent-style-name="Text_20_body" style:list-style-name="L4">
      <style:text-properties style:font-name="DejaVu Serif" fo:font-size="14pt" style:font-size-asian="14pt" style:font-size-complex="14pt"/>
    </style:style>
    <style:style style:name="T1" style:family="text">
      <style:text-properties style:font-name="DejaVu Serif" fo:font-size="14pt" style:font-size-asian="14pt" style:font-size-complex="14pt"/>
    </style:style>
    <style:style style:name="T2"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Documentation – Étude des composants passifs</text:h>
      <text:h text:style-name="P3" text:outline-level="2">1. Introduction</text:h>
      <text:p text:style-name="P6"><text:span text:style-name="T2">Les composants passifs</text:span> constituent les éléments fondamentaux de tout circuit électronique. Contrairement aux composants actifs, ils ne permettent pas d'amplifier un signal ni de fournir de l'énergie au circuit. Leur rôle est de dissiper, stocker ou transférer l'énergie électrique selon leurs caractéristiques physiques.</text:p>
      <text:p text:style-name="P6">La compréhension de ces composants est indispensable pour concevoir des circuits analogiques, numériques et de puissance. Ils interviennent dans des applications variées telles que le filtrage des signaux, le stockage temporaire d'énergie, l'adaptation d'impédance, la limitation du courant et la stabilisation des alimentations.</text:p>
      <text:p text:style-name="P6">Cette étude a pour objectif d'analyser le comportement des principaux composants passifs à l'aide de simulations réalisées sous LTspice.</text:p>
      <text:p text:style-name="P4"/>
      <text:h text:style-name="P2" text:outline-level="1">2. Qu'est-ce qu'un composant passif ?</text:h>
      <text:p text:style-name="P6">Un composant passif est un composant électronique qui ne crée pas d'énergie et ne fournit aucun gain de puissance. Il se contente de dissiper ou de stocker l'énergie reçue du circuit.</text:p>
      <text:p text:style-name="P6">Les trois composants passifs fondamentaux sont :</text:p>
      <text:list text:style-name="L1">
        <text:list-item>
          <text:p text:style-name="P8">la résistance (R),</text:p>
        </text:list-item>
        <text:list-item>
          <text:p text:style-name="P8">le condensateur (C),</text:p>
        </text:list-item>
        <text:list-item>
          <text:p text:style-name="P8">l'inductance (L).</text:p>
        </text:list-item>
      </text:list>
      <text:p text:style-name="P6">Ces trois éléments constituent la base de nombreux montages électroniques et permettent de réaliser des fonctions essentielles comme les filtres, les oscillateurs, les alimentations et les circuits de temporisation.</text:p>
      <text:p text:style-name="P4"/>
      <text:h text:style-name="P2" text:outline-level="1"><text:soft-page-break/>3. Objectifs de cette étude</text:h>
      <text:p text:style-name="P6">Cette étude poursuit plusieurs objectifs :</text:p>
      <text:list text:style-name="L2">
        <text:list-item>
          <text:p text:style-name="P9">comprendre le fonctionnement des composants passifs ;</text:p>
        </text:list-item>
        <text:list-item>
          <text:p text:style-name="P9">étudier leurs relations fondamentales entre tension et courant ;</text:p>
        </text:list-item>
        <text:list-item>
          <text:p text:style-name="P9">observer leur comportement en régime continu (DC) et en régime variable ;</text:p>
        </text:list-item>
        <text:list-item>
          <text:p text:style-name="P9">analyser le stockage ou la dissipation de l'énergie ;</text:p>
        </text:list-item>
        <text:list-item>
          <text:p text:style-name="P9">mettre en pratique ces notions grâce aux simulations LTspice.</text:p>
        </text:list-item>
      </text:list>
      <text:p text:style-name="P4"/>
      <text:h text:style-name="P2" text:outline-level="1">4. Outil utilisé</text:h>
      <text:p text:style-name="Text_20_body"><text:span text:style-name="T1">Les simulations sont réalisées avec </text:span><text:span text:style-name="Strong_20_Emphasis"><text:span text:style-name="T1">LTspice</text:span></text:span><text:span text:style-name="T1">, un logiciel de simulation SPICE largement utilisé dans l'industrie électronique.</text:span></text:p>
      <text:p text:style-name="P6">LTspice permet notamment de :</text:p>
      <text:list text:style-name="L3">
        <text:list-item>
          <text:p text:style-name="P10">simuler des circuits analogiques ;</text:p>
        </text:list-item>
        <text:list-item>
          <text:p text:style-name="P10">visualiser les tensions et les courants ;</text:p>
        </text:list-item>
        <text:list-item>
          <text:p text:style-name="P10">étudier la réponse temporelle des circuits ;</text:p>
        </text:list-item>
        <text:list-item>
          <text:p text:style-name="P10">effectuer des analyses fréquentielles ;</text:p>
        </text:list-item>
        <text:list-item>
          <text:p text:style-name="P10">valider une conception avant la réalisation d'un circuit imprimé (PCB).</text:p>
        </text:list-item>
      </text:list>
      <text:p text:style-name="P4"/>
      <text:h text:style-name="P2" text:outline-level="1">5. Organisation de l'étude</text:h>
      <text:p text:style-name="P6">L'étude est organisée en plusieurs parties :</text:p>
      <text:list text:style-name="L4">
        <text:list-item>
          <text:p text:style-name="P11">Étude de la résistance.</text:p>
        </text:list-item>
        <text:list-item>
          <text:p text:style-name="P11">Étude du condensateur.</text:p>
        </text:list-item>
        <text:list-item>
          <text:p text:style-name="P11">Étude de l'inductance.</text:p>
        </text:list-item>
        <text:list-item>
          <text:p text:style-name="P11">Étude des circuits RC.</text:p>
        </text:list-item>
        <text:list-item>
          <text:p text:style-name="P11"><text:soft-page-break/>Étude des circuits RL.</text:p>
        </text:list-item>
        <text:list-item>
          <text:p text:style-name="P11">Étude des circuits RLC.</text:p>
        </text:list-item>
        <text:list-item>
          <text:p text:style-name="P11">Analyse des résultats et conclusion.<text:span text:style-name="T1"/></text:p>
        </text:list-item>
      </text:list>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erif" svg:font-family="'DejaVu 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949d8" officeooo:paragraph-rsid="001949d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uteur : <text:s/>Thérèse Lessebi </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19T21:08:20.779934953</meta:creation-date>
    <dc:date>2026-07-19T21:16:41.382183438</dc:date>
    <meta:editing-duration>PT8M21S</meta:editing-duration>
    <meta:editing-cycles>2</meta:editing-cycles>
    <meta:generator>LibreOffice/24.2.7.2$Linux_X86_64 LibreOffice_project/420$Build-2</meta:generator>
    <meta:document-statistic meta:table-count="0" meta:image-count="0" meta:object-count="0" meta:page-count="3" meta:paragraph-count="37" meta:word-count="370" meta:character-count="2447" meta:non-whitespace-character-count="2131"/>
  </office:meta>
</office:document-meta>
</file>